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15E0BAC56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09in, 0.4409in, 0.4429in, 0.80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409in, 0.4409in, 2.8752in, 0.801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 Copy 1" text:anchor-type="char" svg:x="-0.1327in" svg:y="7.8693in" svg:width="6.9161in" svg:height="0.9484in" draw:z-index="0"><draw:image xlink:href="Pictures/100000010000015E0000015E0BAC56F3.png" xlink:type="simple" xlink:show="embed" xlink:actuate="onLoad" draw:mime-type="image/png"/></draw:frame><draw:frame draw:style-name="fr1" draw:name="Image1" text:anchor-type="char" svg:x="-0.1327in" svg:y="-0.0772in" svg:width="6.9161in" svg:height="7.9472in" draw:z-index="1"><draw:image xlink:href="Pictures/100000010000015E0000015E0BAC56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20:33:56.571813488</meta:creation-date>
    <dc:date>2026-05-28T20:44:02.998010289</dc:date>
    <meta:editing-duration>PT10M6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